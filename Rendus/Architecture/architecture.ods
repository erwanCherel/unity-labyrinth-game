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3.80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236cm"/>
    </style:style>
    <style:style style:name="co5" style:family="table-column">
      <style:table-column-properties fo:break-before="auto" style:column-width="1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s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errainAutoUpgra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ima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otst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gi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ss Voice P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ton_Texture_P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ves and Dunge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metery Kit V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steps Mini Sound P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VOZD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DRPDefaultResour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ronSpear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sic Atmoshpere Horr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yMa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ylizedHandPaintedDungeon(Fre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kele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fab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oo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mi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actab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our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e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ve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ableObjec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rip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mi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actab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Mesh P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k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ctSettin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Setting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08:56:40.466611993</meta:creation-date>
    <dc:date>2025-10-22T09:39:19.791061105</dc:date>
    <meta:editing-duration>PT30M23S</meta:editing-duration>
    <meta:editing-cycles>4</meta:editing-cycles>
    <meta:generator>LibreOffice/25.2.6.2$Linux_X86_64 LibreOffice_project/40d1a0e1d5bdf1afaeae24d9ece32bbb00fa66a4</meta:generator>
    <meta:document-statistic meta:table-count="1" meta:cell-count="54" meta:object-count="0"/>
  </office:meta>
</office:document-meta>
</file>